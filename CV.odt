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adornments="Normálne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language="sk" fo:country="SK" officeooo:rsid="0016e566" officeooo:paragraph-rsid="0016e566" style:font-size-asian="1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3">
      <style:text-properties fo:color="#4f81bd" loext:opacity="100%" style:font-name="Calibri" fo:font-size="11pt" fo:font-weight="bold" officeooo:rsid="001c03c7" officeooo:paragraph-rsid="001c03c7" style:font-name-asian="ＭＳ ゴシック" style:font-size-asian="11pt" style:font-weight-asian="bold" style:font-name-complex="Tahoma" style:font-weight-complex="bold"/>
    </style:style>
    <style:style style:name="P4" style:family="paragraph" style:parent-style-name="Heading_20_2">
      <style:text-properties fo:color="#4f81bd" loext:opacity="100%" style:font-name="Calibri" fo:font-size="13pt" fo:font-weight="bold" officeooo:rsid="001c03c7" officeooo:paragraph-rsid="001c03c7" style:font-name-asian="ＭＳ ゴシック" style:font-size-asian="13pt" style:font-weight-asian="bold" style:font-name-complex="Tahoma" style:font-size-complex="13pt" style:font-weight-complex="bold"/>
    </style:style>
    <style:style style:name="P5" style:family="paragraph" style:parent-style-name="Heading_20_2">
      <style:text-properties fo:color="#4f81bd" loext:opacity="100%" style:font-name="Calibri" fo:font-size="13pt" fo:language="en" fo:country="GB" fo:font-weight="bold" officeooo:rsid="0024ef84" officeooo:paragraph-rsid="0024ef84" style:font-name-asian="ＭＳ ゴシック" style:font-size-asian="13pt" style:font-weight-asian="bold" style:font-name-complex="Tahoma" style:font-size-complex="13pt" style:font-weight-complex="bold"/>
    </style:style>
    <style:style style:name="P6" style:family="paragraph" style:parent-style-name="Heading_20_2">
      <style:text-properties fo:color="#4f81bd" loext:opacity="100%" style:font-name="Calibri" fo:font-size="13pt" fo:language="en" fo:country="GB" fo:font-weight="bold" officeooo:rsid="002567ac" officeooo:paragraph-rsid="002567ac" style:font-name-asian="ＭＳ ゴシック" style:font-size-asian="13pt" style:font-weight-asian="bold" style:font-name-complex="Tahoma" style:font-size-complex="13pt" style:font-weight-complex="bold"/>
    </style:style>
    <style:style style:name="P7" style:family="paragraph" style:parent-style-name="Heading_20_1" style:master-page-name="Standard">
      <style:paragraph-properties fo:text-align="center" style:justify-single-word="false" style:page-number="auto"/>
      <style:text-properties fo:color="#365f91" loext:opacity="100%" style:font-name="Calibri" fo:font-size="14pt" fo:font-weight="bold" officeooo:rsid="0011c819" officeooo:paragraph-rsid="0011c819" style:font-name-asian="ＭＳ ゴシック" style:font-size-asian="14pt" style:font-weight-asian="bold" style:font-size-complex="14pt" style:font-weight-complex="bold"/>
    </style:style>
    <style:style style:name="P8" style:family="paragraph" style:parent-style-name="List_20_Bullet" style:list-style-name="WWNum1"/>
    <style:style style:name="P9" style:family="paragraph" style:parent-style-name="List_20_Bullet" style:list-style-name="WWNum1">
      <style:text-properties style:font-name="Arial" fo:font-size="11pt" officeooo:rsid="001c03c7" officeooo:paragraph-rsid="001c03c7" style:font-size-asian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99018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officeooo:rsid="001565f3" style:font-style-asian="italic"/>
    </style:style>
    <style:style style:name="T5" style:family="text">
      <style:text-properties style:font-name="Arial" fo:font-size="11pt" officeooo:rsid="0011c819" style:font-size-asian="11pt"/>
    </style:style>
    <style:style style:name="T6" style:family="text">
      <style:text-properties style:font-name="Arial" fo:font-size="11pt" officeooo:rsid="001565f3" style:font-size-asian="11pt"/>
    </style:style>
    <style:style style:name="T7" style:family="text">
      <style:text-properties style:font-name="Arial" fo:font-size="11pt" officeooo:rsid="001c03c7" style:font-size-asian="11pt"/>
    </style:style>
    <style:style style:name="T8" style:family="text">
      <style:text-properties style:font-name="Arial" fo:font-size="11pt" officeooo:rsid="001f5bff" style:font-size-asian="11pt"/>
    </style:style>
    <style:style style:name="T9" style:family="text">
      <style:text-properties style:font-name="Arial" fo:font-size="11pt" fo:font-weight="bold" officeooo:rsid="001565f3" style:font-size-asian="11pt" style:font-weight-asian="bold"/>
    </style:style>
    <style:style style:name="T10" style:family="text">
      <style:text-properties style:font-name="Arial" fo:font-size="11pt" fo:font-weight="bold" officeooo:rsid="002099dd" style:font-size-asian="11pt" style:font-weight-asian="bold"/>
    </style:style>
    <style:style style:name="T11" style:family="text">
      <style:text-properties style:font-name="Arial" fo:font-size="11pt" fo:language="sk" fo:country="SK" fo:font-weight="bold" officeooo:rsid="0016e566" style:font-size-asian="11pt" style:font-weight-asian="bold"/>
    </style:style>
    <style:style style:name="T12" style:family="text">
      <style:text-properties style:font-name="Arial" fo:font-size="11pt" fo:language="sk" fo:country="SK" fo:font-weight="bold" officeooo:rsid="00292140" style:font-size-asian="11pt" style:font-weight-asian="bold"/>
    </style:style>
    <style:style style:name="T13" style:family="text">
      <style:text-properties style:font-name="Arial" fo:font-size="11pt" fo:language="sk" fo:country="SK" fo:font-weight="bold" officeooo:rsid="0028ce6d" style:font-size-asian="11pt" style:font-weight-asian="bold"/>
    </style:style>
    <style:style style:name="T14" style:family="text">
      <style:text-properties style:font-name="Arial" fo:font-size="11pt" fo:language="sk" fo:country="SK" fo:font-weight="bold" officeooo:rsid="002a9834" style:font-size-asian="11pt" style:font-weight-asian="bold"/>
    </style:style>
    <style:style style:name="T15" style:family="text">
      <style:text-properties style:font-name="Arial" fo:font-size="11pt" fo:language="sk" fo:country="SK" fo:font-weight="bold" officeooo:rsid="002d2a39" style:font-size-asian="11pt" style:font-weight-asian="bold"/>
    </style:style>
    <style:style style:name="T16" style:family="text">
      <style:text-properties style:font-name="Arial" fo:font-size="11pt" fo:language="sk" fo:country="SK" officeooo:rsid="001565f3" style:font-size-asian="11pt"/>
    </style:style>
    <style:style style:name="T17" style:family="text">
      <style:text-properties style:font-name="Arial" fo:font-size="11pt" fo:language="sk" fo:country="SK" officeooo:rsid="0016e566" style:font-size-asian="11pt"/>
    </style:style>
    <style:style style:name="T18" style:family="text">
      <style:text-properties style:font-name="Arial" fo:font-size="11pt" fo:language="sk" fo:country="SK" officeooo:rsid="00176895" style:font-size-asian="11pt"/>
    </style:style>
    <style:style style:name="T19" style:family="text">
      <style:text-properties style:font-name="Arial" fo:font-size="11pt" fo:language="sk" fo:country="SK" officeooo:rsid="001adb9b" style:font-size-asian="11pt"/>
    </style:style>
    <style:style style:name="T20" style:family="text">
      <style:text-properties style:font-name="Arial" fo:font-size="11pt" fo:language="sk" fo:country="SK" officeooo:rsid="00299018" style:font-size-asian="11pt"/>
    </style:style>
    <style:style style:name="T21" style:family="text">
      <style:text-properties style:font-name="Arial" fo:font-size="11pt" fo:language="sk" fo:country="SK" officeooo:rsid="001f5bff" style:font-size-asian="11pt"/>
    </style:style>
    <style:style style:name="T22" style:family="text">
      <style:text-properties style:font-name="Arial" fo:font-size="11pt" fo:language="sk" fo:country="SK" officeooo:rsid="002b7045" style:font-size-asian="11pt"/>
    </style:style>
    <style:style style:name="T23" style:family="text">
      <style:text-properties style:font-name="Arial" fo:font-size="11pt" fo:language="sk" fo:country="SK" fo:font-style="italic" officeooo:rsid="001f5bff" style:font-size-asian="11pt" style:font-style-asian="italic"/>
    </style:style>
    <style:style style:name="T24" style:family="text">
      <style:text-properties style:font-name="Arial" fo:font-size="11pt" fo:font-style="italic" officeooo:rsid="001f5bff" style:font-size-asian="11pt" style:font-style-asian="italic"/>
    </style:style>
    <style:style style:name="T25" style:family="text">
      <style:text-properties style:font-name="Arial" fo:font-size="11pt" fo:language="en" fo:country="GB" fo:font-weight="bold" officeooo:rsid="002099dd" style:font-size-asian="11pt" style:font-weight-asian="bold"/>
    </style:style>
    <style:style style:name="T26" style:family="text">
      <style:text-properties style:font-name="Arial" fo:font-size="11pt" fo:language="en" fo:country="GB" fo:font-weight="bold" officeooo:rsid="001565f3" style:font-size-asian="11pt" style:font-weight-asian="bold"/>
    </style:style>
    <style:style style:name="T27" style:family="text">
      <style:text-properties style:font-name="Arial" fo:font-size="11pt" fo:language="en" fo:country="GB" fo:font-weight="bold" officeooo:rsid="0020fafb" style:font-size-asian="11pt" style:font-weight-asian="bold"/>
    </style:style>
    <style:style style:name="T28" style:family="text">
      <style:text-properties style:font-name="Arial" fo:font-size="11pt" fo:language="en" fo:country="GB" fo:font-weight="bold" officeooo:rsid="00272e37" style:font-size-asian="11pt" style:font-weight-asian="bold"/>
    </style:style>
    <style:style style:name="T29" style:family="text">
      <style:text-properties style:font-name="Arial" fo:font-size="11pt" fo:language="en" fo:country="GB" fo:font-weight="bold" officeooo:rsid="0028ce6d" style:font-size-asian="11pt" style:font-weight-asian="bold"/>
    </style:style>
    <style:style style:name="T30" style:family="text">
      <style:text-properties style:font-name="Arial" fo:font-size="11pt" fo:language="en" fo:country="GB" officeooo:rsid="0020fafb" style:font-size-asian="11pt"/>
    </style:style>
    <style:style style:name="T31" style:family="text">
      <style:text-properties style:font-name="Arial" fo:font-size="11pt" fo:language="en" fo:country="GB" officeooo:rsid="0021806d" style:font-size-asian="11pt"/>
    </style:style>
    <style:style style:name="T32" style:family="text">
      <style:text-properties style:font-name="Arial" fo:font-size="11pt" fo:language="en" fo:country="GB" officeooo:rsid="00235669" style:font-size-asian="11pt"/>
    </style:style>
    <style:style style:name="T33" style:family="text">
      <style:text-properties style:font-name="Arial" fo:font-size="11pt" fo:language="en" fo:country="GB" officeooo:rsid="0016e566" style:font-size-asian="11pt"/>
    </style:style>
    <style:style style:name="T34" style:family="text">
      <style:text-properties style:font-name="Arial" fo:font-size="11pt" fo:language="en" fo:country="GB" officeooo:rsid="0028ce6d" style:font-size-asian="11pt"/>
    </style:style>
    <style:style style:name="T35" style:family="text">
      <style:text-properties fo:language="sk" fo:country="SK"/>
    </style:style>
    <style:style style:name="T36" style:family="text">
      <style:text-properties fo:language="sk" fo:country="SK" officeooo:rsid="001565f3"/>
    </style:style>
    <style:style style:name="T37" style:family="text">
      <style:text-properties fo:language="sk" fo:country="SK" officeooo:rsid="0016e566"/>
    </style:style>
    <style:style style:name="T38" style:family="text">
      <style:text-properties fo:language="sk" fo:country="SK" officeooo:rsid="0018f52b"/>
    </style:style>
    <style:style style:name="T39" style:family="text">
      <style:text-properties fo:language="sk" fo:country="SK" officeooo:rsid="001ba146"/>
    </style:style>
    <style:style style:name="T40" style:family="text">
      <style:text-properties fo:language="sk" fo:country="SK" officeooo:rsid="00292140"/>
    </style:style>
    <style:style style:name="T41" style:family="text">
      <style:text-properties fo:language="sk" fo:country="SK" officeooo:rsid="00299018"/>
    </style:style>
    <style:style style:name="T42" style:family="text">
      <style:text-properties fo:language="sk" fo:country="SK" officeooo:rsid="002ebdcd"/>
    </style:style>
    <style:style style:name="T43" style:family="text">
      <style:text-properties fo:language="sk" fo:country="SK" officeooo:rsid="00301655"/>
    </style:style>
    <style:style style:name="T44" style:family="text">
      <style:text-properties officeooo:rsid="001c03c7"/>
    </style:style>
    <style:style style:name="T45" style:family="text">
      <style:text-properties fo:color="#4f81bd" loext:opacity="100%" style:font-name="Calibri" fo:font-size="13pt" fo:font-weight="bold" officeooo:rsid="001c03c7" style:font-name-asian="ＭＳ ゴシック" style:font-size-asian="13pt" style:font-weight-asian="bold" style:font-name-complex="Tahoma" style:font-size-complex="13pt" style:font-weight-complex="bold"/>
    </style:style>
    <style:style style:name="T46" style:family="text">
      <style:text-properties fo:color="#4f81bd" loext:opacity="100%" style:font-name="Calibri" fo:font-size="11pt" fo:font-weight="bold" officeooo:rsid="001c03c7" style:font-name-asian="ＭＳ ゴシック" style:font-size-asian="11pt" style:font-weight-asian="bold" style:font-name-complex="Tahoma" style:font-weight-complex="bold"/>
    </style:style>
    <style:style style:name="T47" style:family="text">
      <style:text-properties fo:language="en" fo:country="GB"/>
    </style:style>
    <style:style style:name="T48" style:family="text">
      <style:text-properties fo:language="en" fo:country="GB" fo:font-weight="bold" officeooo:rsid="002099dd" style:font-weight-asian="bold"/>
    </style:style>
    <style:style style:name="T49" style:family="text">
      <style:text-properties fo:language="en" fo:country="GB" officeooo:rsid="0020fafb"/>
    </style:style>
    <style:style style:name="T50" style:family="text">
      <style:text-properties officeooo:rsid="00299018"/>
    </style:style>
    <style:style style:name="T51" style:family="text">
      <style:text-properties officeooo:rsid="002a9834"/>
    </style:style>
    <style:style style:name="T52" style:family="text">
      <style:text-properties officeooo:rsid="002b70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Peter Rodziňák</text:h>
      <text:p text:style-name="P2"><text:span text:style-name="T29">Contact</text:span><text:span text:style-name="T1">: </text:span><text:span text:style-name="T5">+421 902 593 013</text:span> | <text:span text:style-name="T5">peter.rodzinak.n3@gmail.com</text:span><text:line-break/><text:span text:style-name="T14">Links</text:span><text:span text:style-name="T1">: </text:span><text:a xlink:type="simple" xlink:href="https://github.com/PeterRodzinak/Portfolio" text:style-name="Internet_20_link" text:visited-style-name="Visited_20_Internet_20_Link"><text:span text:style-name="T19">Github</text:span></text:a> </text:p>
      <text:h text:style-name="P4" text:outline-level="2">About me</text:h>
      <text:p text:style-name="Standard">Master's degree student (BSc. successfully completed) focusing on digital design and embedded systems. I design hardware in Verilog and SystemVerilog, primarily develop in C++, and use Python for rapid prototyping. Seeking an opportunity (internship / part-time) to connect these domains on real-world projects in chip design and hardware development. </text:p>
      <text:h text:style-name="Heading_20_2" text:outline-level="2">Top <text:span text:style-name="T45">Projects</text:span></text:h>
      <text:h text:style-name="Heading_20_3" text:outline-level="3"><text:span text:style-name="T46">Advanced cryptography on</text:span><text:span text:style-name="T1"> FPGA (Basys 3)</text:span></text:h>
      <text:p text:style-name="Standard"><text:span text:style-name="T39">Source</text:span>: <text:a xlink:type="simple" xlink:href="https://github.com/PeterRodzinak/Portfolio/tree/main/Projects/Hardware%20design" text:style-name="Internet_20_link" text:visited-style-name="Visited_20_Internet_20_Link">https://github.com/PeterRodzinak/Portfolio/tree/main/Projects/Hardware%20design</text:a></text:p>
      <text:p text:style-name="Standard">Tech stack: Verilog / SystemVerilog, <text:span text:style-name="T39">C++, Python</text:span>, FPGA (Xilinx Artix-7 / Basys 3), Vivado</text:p>
      <text:list xml:id="list2947919827" text:style-name="WWNum1">
        <text:list-item>
          <text:p text:style-name="P8">Design and complete implementation of the RC6 cryptographic algorithm directly at the hardware level. </text:p>
        </text:list-item>
        <text:list-item>
          <text:p text:style-name="P8">Successful timing closure resolution, logic element optimization, and chip area minimization while maintaining high throughput. </text:p>
        </text:list-item>
        <text:list-item>
          <text:p text:style-name="P8">Mathematical proof of concept and test vector generation initially implemented as a rapid Python prototype, subsequently translated into RTL description. </text:p>
        </text:list-item>
      </text:list>
      <text:h text:style-name="P3" text:outline-level="3"><text:span text:style-name="T35">Ap</text:span><text:span text:style-name="T40">p</text:span><text:span text:style-name="T35">lication</text:span> system on LilyGo TWatch-S3</text:h>
      <text:p text:style-name="Standard"><text:span text:style-name="T7">Source</text:span>: <text:a xlink:type="simple" xlink:href="https://github.com/PeterRodzinak/Portfolio/tree/main/Projects/Embedded%20system%20application" text:style-name="Internet_20_link" text:visited-style-name="Visited_20_Internet_20_Link">https://github.com/PeterRodzinak/Portfolio/tree/main/Projects/Embedded%20system%20application</text:a></text:p>
      <text:p text:style-name="Standard">Tech stack: C++, CMake, Git</text:p>
      <text:list xml:id="list222323667700462" text:continue-numbering="true" text:style-name="WWNum1">
        <text:list-item>
          <text:p text:style-name="P9">Hobby multi-application system for opensource smart-watch, managing WiFi connection, using<text:span text:style-name="T35"> </text:span><text:span text:style-name="T43">third-</text:span>party web services, time synchronizatio<text:span text:style-name="T42">n</text:span> using NTP, etc.</text:p>
        </text:list-item>
        <text:list-item>
          <text:p text:style-name="P8">Implementation emphasizing battery optimization, application scalability, memory management, and object-oriented design.</text:p>
        </text:list-item>
        <text:list-item>
          <text:p text:style-name="P8">Utilization of modern C++ features and integration of automated project builds using a PlatformIO script.</text:p>
        </text:list-item>
      </text:list>
      <text:h text:style-name="Heading_20_2" text:outline-level="2">Technic<text:span text:style-name="T44">al</text:span> <text:span text:style-name="T44">skills</text:span></text:h>
      <text:list xml:id="list222325048198734" text:continue-numbering="true" text:style-name="WWNum1">
        <text:list-item>
          <text:p text:style-name="P8"><text:span text:style-name="T1">Hardware Design: </text:span>Verilog, SystemVerilog, RTL coding, basics of functional verification, FPGA workflow (Basys 3, Vivado). </text:p>
        </text:list-item>
        <text:list-item>
          <text:p text:style-name="P8"><text:soft-page-break/><text:span text:style-name="T1">Software Development: </text:span>C++ (<text:span text:style-name="T49">advanced concepts, low-level development</text:span>), Python (<text:span text:style-name="T30">basic scripting</text:span>, <text:span text:style-name="T38">prototyping</text:span>).</text:p>
        </text:list-item>
        <text:list-item>
          <text:p text:style-name="P8"><text:span text:style-name="T27">Tools</text:span><text:span text:style-name="T1">: </text:span>Git (<text:span text:style-name="T32">version control</text:span>), Linux/Unix <text:span text:style-name="T31">environment</text:span>, CMake</text:p>
        </text:list-item>
      </text:list>
      <text:h text:style-name="P5" text:outline-level="2">Education</text:h>
      <text:p text:style-name="Standard"><text:span text:style-name="T10">Master’</text:span><text:span text:style-name="T25">s degree</text:span><text:span text:style-name="T1">: </text:span><text:span text:style-name="T25">Applied informatics</text:span><text:span text:style-name="T11">, </text:span><text:span text:style-name="T25">s</text:span><text:span text:style-name="T11">pec. </text:span><text:span text:style-name="T12">Embedded </text:span><text:span text:style-name="T15">S</text:span><text:span text:style-name="T12">ystems</text:span><text:span text:style-name="T11">.</text:span><text:span text:style-name="T1"><text:line-break/></text:span><text:span text:style-name="T20">CTU</text:span><text:span text:style-name="T17"> FIT</text:span>, Pra<text:span text:style-name="T41">gue</text:span> | <text:span text:style-name="T8">Expected graduation</text:span>: <text:span text:style-name="T37">2028</text:span></text:p>
      <text:p text:style-name="Standard"><text:span text:style-name="T28">Bachelor’s degree</text:span><text:span text:style-name="T1">: </text:span><text:span text:style-name="T48">Informatics, spec. </text:span><text:span text:style-name="T25">Computer </text:span><text:span text:style-name="T15">E</text:span><text:span text:style-name="T25">ngineering</text:span><text:span text:style-name="T1"><text:line-break/></text:span><text:span text:style-name="T20">CTU</text:span><text:span text:style-name="T16"> </text:span><text:span text:style-name="T17">FIT,</text:span><text:span text:style-name="T33"> </text:span><text:span text:style-name="T34">Pra</text:span><text:span text:style-name="T20">gue</text:span><text:span text:style-name="T47"> </text:span>| <text:span text:style-name="T22">Graduated</text:span>:<text:span text:style-name="T36"> 2025</text:span><text:line-break/><text:span text:style-name="T24">Bachelor thesis topic</text:span><text:span text:style-name="T3">: </text:span><text:span text:style-name="T23">Robotic arm with tactile sensors</text:span></text:p>
      <text:h text:style-name="P6" text:outline-level="2">Work experience</text:h>
      <text:list xml:id="list222324191543968" text:continue-numbering="true" text:style-name="WWNum1">
        <text:list-item>
          <text:p text:style-name="P8"><text:span text:style-name="T25">Part-time job</text:span><text:span text:style-name="T11">: </text:span><text:span text:style-name="T25">Instructor</text:span><text:span text:style-name="T9">/</text:span><text:span text:style-name="T26">Anim</text:span><text:span text:style-name="T25">a</text:span><text:span text:style-name="T26">tor</text:span> | <text:span text:style-name="T6">Hemisféra</text:span><text:span text:style-name="T16"> </text:span><text:span text:style-name="T17">ľavá o.z., </text:span><text:span text:style-name="T18">Bratislava</text:span><text:span text:style-name="T35"> </text:span><text:span text:style-name="T3">[</text:span><text:span text:style-name="T4">2017</text:span><text:span text:style-name="T3"> - </text:span><text:span text:style-name="T4">2022</text:span><text:span text:style-name="T3">]</text:span></text:p>
        </text:list-item>
      </text:list>
      <text:p text:style-name="P1">Teaching children and youth computer game development in programming and game design, supervising participants in a day camp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adornments="Normálne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default-outline-level="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default-outline-level="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default-outline-level="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default-outline-level="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default-outline-level="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default-outline-level="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ython-docx</meta:initial-creator>
    <dc:description>generated by python-docx</dc:description>
    <meta:editing-cycles>24</meta:editing-cycles>
    <meta:creation-date>2013-12-23T23:15:00</meta:creation-date>
    <dc:date>2026-05-31T22:23:22.933000000</dc:date>
    <meta:editing-duration>P6DT21H14M6S</meta:editing-duration>
    <meta:generator>LibreOffice/7.0.1.2$Windows_X86_64 LibreOffice_project/7cbcfc562f6eb6708b5ff7d7397325de9e764452</meta:generator>
    <meta:document-statistic meta:table-count="0" meta:image-count="0" meta:object-count="0" meta:page-count="2" meta:paragraph-count="27" meta:word-count="302" meta:character-count="2398" meta:non-whitespace-character-count="212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