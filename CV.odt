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adornments="Normálne" style:font-family-generic="roman" style:font-pitch="variable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Heading_20_1" style:master-page-name="Standard">
      <style:paragraph-properties fo:text-align="center" style:justify-single-word="false" style:page-number="auto"/>
      <style:text-properties fo:color="#365f91" loext:opacity="100%" style:font-name="Calibri" fo:font-size="14pt" fo:font-weight="bold" officeooo:rsid="0011c819" officeooo:paragraph-rsid="0011c819" style:font-name-asian="ＭＳ ゴシック" style:font-size-asian="14pt" style:font-weight-asian="bold" style:font-size-complex="14pt" style:font-weight-complex="bold"/>
    </style:style>
    <style:style style:name="P3" style:family="paragraph" style:parent-style-name="Heading_20_3">
      <style:text-properties fo:font-weight="bold" style:font-weight-asian="bold"/>
    </style:style>
    <style:style style:name="P4" style:family="paragraph" style:parent-style-name="List_20_Bullet" style:list-style-name="WWNum1"/>
    <style:style style:name="P5" style:family="paragraph" style:parent-style-name="Standard">
      <style:text-properties style:font-name="Arial" fo:font-size="11pt" fo:language="sk" fo:country="SK" officeooo:rsid="0016e566" officeooo:paragraph-rsid="0016e566" style:font-size-asian="11pt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officeooo:rsid="001565f3" style:font-style-asian="italic"/>
    </style:style>
    <style:style style:name="T4" style:family="text">
      <style:text-properties style:font-name="Arial" fo:font-size="11pt" officeooo:rsid="0011c819" style:font-size-asian="11pt"/>
    </style:style>
    <style:style style:name="T5" style:family="text">
      <style:text-properties style:font-name="Arial" fo:font-size="11pt" officeooo:rsid="00136c82" style:font-size-asian="11pt"/>
    </style:style>
    <style:style style:name="T6" style:family="text">
      <style:text-properties style:font-name="Arial" fo:font-size="11pt" officeooo:rsid="001565f3" style:font-size-asian="11pt"/>
    </style:style>
    <style:style style:name="T7" style:family="text">
      <style:text-properties style:font-name="Arial" fo:font-size="11pt" fo:font-weight="bold" officeooo:rsid="001565f3" style:font-size-asian="11pt" style:font-weight-asian="bold"/>
    </style:style>
    <style:style style:name="T8" style:family="text">
      <style:text-properties style:font-name="Arial" fo:font-size="11pt" fo:language="sk" fo:country="SK" fo:font-weight="bold" officeooo:rsid="001565f3" style:font-size-asian="11pt" style:font-weight-asian="bold"/>
    </style:style>
    <style:style style:name="T9" style:family="text">
      <style:text-properties style:font-name="Arial" fo:font-size="11pt" fo:language="sk" fo:country="SK" fo:font-weight="bold" officeooo:rsid="0016e566" style:font-size-asian="11pt" style:font-weight-asian="bold"/>
    </style:style>
    <style:style style:name="T10" style:family="text">
      <style:text-properties style:font-name="Arial" fo:font-size="11pt" fo:language="sk" fo:country="SK" officeooo:rsid="001565f3" style:font-size-asian="11pt"/>
    </style:style>
    <style:style style:name="T11" style:family="text">
      <style:text-properties style:font-name="Arial" fo:font-size="11pt" fo:language="sk" fo:country="SK" officeooo:rsid="0016e566" style:font-size-asian="11pt"/>
    </style:style>
    <style:style style:name="T12" style:family="text">
      <style:text-properties fo:language="sk" fo:country="SK"/>
    </style:style>
    <style:style style:name="T13" style:family="text">
      <style:text-properties fo:language="sk" fo:country="SK" officeooo:rsid="001565f3"/>
    </style:style>
    <style:style style:name="T14" style:family="text">
      <style:text-properties fo:language="sk" fo:country="SK" officeooo:rsid="0016e5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Peter Rodziňák</text:h>
      <text:p text:style-name="P1"><text:span text:style-name="T1">Kontakt: </text:span><text:span text:style-name="T4">+421902593013</text:span> | <text:span text:style-name="T4">peter.rodzinak.n3@gmail.com</text:span><text:line-break/><text:span text:style-name="T1">Odkazy: </text:span>[Link na GitHub / GitLab] | [Link na LinkedIn]</text:p>
      <text:h text:style-name="Heading_20_2" text:outline-level="2">Profil / O mne</text:h>
      <text:p text:style-name="Standard">Študent inžinierskeho stupňa (Bc. titul úspešne dokončený) so zameraním na digitálny dizajn a embedded systémy. Hardvér navrhujem vo Verilogu a SystemVerilogu, hlavný vývoj smerujem do C++ a na rýchly prototyping využívam Python. Hľadám priestor (stáž / part-time), kde môžem tieto svety prepojiť na reálnych projektoch v oblasti čipového dizajnu a vývoja hardvéru.</text:p>
      <text:h text:style-name="Heading_20_2" text:outline-level="2">Top Projekty</text:h>
      <text:h text:style-name="P3" text:outline-level="3">Pokročilá kryptografia na FPGA (Basys 3)</text:h>
      <text:p text:style-name="Standard">Zdrojový kód: [Link na GitHub repozitár]</text:p>
      <text:p text:style-name="Standard">Tech stack: Verilog / SystemVerilog, FPGA (Xilinx Artix-7 / Basys 3), Vivado</text:p>
      <text:list xml:id="list102095174" text:style-name="WWNum1">
        <text:list-item>
          <text:p text:style-name="P4">Návrh a kompletná implementácia kryptografického algoritmu <text:span text:style-name="T5">RC6</text:span> priamo na hardvérovej úrovni.</text:p>
        </text:list-item>
        <text:list-item>
          <text:p text:style-name="P4">Úspešné riešenie timing closure, optimalizácia logických prvkov a minimalizácia plochy na čipe pri zachovaní vysokej priepustnosti (throughput).</text:p>
        </text:list-item>
        <text:list-item>
          <text:p text:style-name="P4">Matematické overenie konceptu a generovanie testovacích vektorov realizované najprv ako rýchly prototyp v Pythone, následne pretavené do RTL popisu.</text:p>
        </text:list-item>
        <text:list-item>
          <text:p text:style-name="P4">[Doplň konkrétne metriky: dosiahnutá frekvencia Fmax v MHz, využitie LUTs / Flip-Flopov v %].</text:p>
        </text:list-item>
      </text:list>
      <text:h text:style-name="P3" text:outline-level="3">[Názov druhého projektu – napr. objektovo orientovaný C++ projekt]</text:h>
      <text:p text:style-name="Standard">Zdrojový kód: [Link na GitHub repozitár]</text:p>
      <text:p text:style-name="Standard">Tech stack: C++, CMake, Git, [prípadne použité knižnice]</text:p>
      <text:list xml:id="list230327924835715" text:continue-numbering="true" text:style-name="WWNum1">
        <text:list-item>
          <text:p text:style-name="P4">[Jednou-dvoma vetami popíš, čo projekt robí, aký problém rieši a prečo vznikol.]</text:p>
        </text:list-item>
        <text:list-item>
          <text:p text:style-name="P4">Implementácia s dôrazom na nízkoúrovňovú optimalizáciu, správu pamäte a objektový návrh.</text:p>
        </text:list-item>
        <text:list-item>
          <text:p text:style-name="P4">Využitie moderných prvkov jazyka C++ a integrácia automatizovaného zostavenia projektu pomocou CMake.</text:p>
        </text:list-item>
      </text:list>
      <text:h text:style-name="Heading_20_2" text:outline-level="2">Technické zručnosti</text:h>
      <text:list xml:id="list230326129877458" text:continue-numbering="true" text:style-name="WWNum1">
        <text:list-item>
          <text:p text:style-name="P4"><text:span text:style-name="T1">Hardware Design: </text:span>Verilog, SystemVerilog, RTL kódovanie, základy funkčnej verifikácie, práca s FPGA (Basys 3, Vivado).</text:p>
        </text:list-item>
        <text:list-item>
          <text:p text:style-name="P4"><text:span text:style-name="T1">Software Development: </text:span>C++ (pokročilé koncepty, nízkoúrovňový vývoj), Python (skriptovanie, prototypovanie, analýza dát).</text:p>
        </text:list-item>
        <text:list-item>
          <text:p text:style-name="P4"><text:soft-page-break/><text:span text:style-name="T1">Nástroje a metodiky: </text:span>Git (verziovanie), Linux/Unix prostredie, CMake, [Doplň ďalšie nástroje, napr. ModelSim, Questasim, GCC, osciloskop].</text:p>
        </text:list-item>
      </text:list>
      <text:h text:style-name="Heading_20_2" text:outline-level="2">Vzdelanie</text:h>
      <text:p text:style-name="Standard"><text:span text:style-name="T1">Inžinierske štúdium: </text:span><text:span text:style-name="T9">Aplikovaná informatika, špec. Vestavěné systémy.</text:span><text:span text:style-name="T1"><text:line-break/></text:span><text:span text:style-name="T11">ČVUT FIT</text:span>, Praha | Očakávané ukončenie: <text:span text:style-name="T14">2028</text:span></text:p>
      <text:p text:style-name="Standard"><text:span text:style-name="T1">Bakalárske štúdium: </text:span><text:span text:style-name="T7">Po</text:span><text:span text:style-name="T8">čítačové inženírství</text:span><text:span text:style-name="T1"><text:line-break/></text:span><text:span text:style-name="T10">ČVUT </text:span><text:span text:style-name="T11">FIT</text:span> | Ukončené:<text:span text:style-name="T13"> 2025</text:span><text:line-break/><text:span text:style-name="T2">Téma bakalárskej práce: [Názov bakalárky alebo stručný popis hardvérového/softvérového zamerania]</text:span></text:p>
      <text:h text:style-name="Heading_20_2" text:outline-level="2">Pracovné skúsenosti</text:h>
      <text:list xml:id="list230327341062411" text:continue-numbering="true" text:style-name="WWNum1">
        <text:list-item>
          <text:p text:style-name="P4"><text:span text:style-name="T9">Brigáda: </text:span><text:span text:style-name="T7">Lektor/Animátor</text:span> | <text:span text:style-name="T6">Hemisféra</text:span><text:span text:style-name="T10"> </text:span><text:span text:style-name="T11">ľavá o.z.</text:span><text:span text:style-name="T12"> </text:span><text:span text:style-name="T2">[</text:span><text:span text:style-name="T3">2017</text:span><text:span text:style-name="T2"> - </text:span><text:span text:style-name="T3">2022</text:span><text:span text:style-name="T2">]</text:span></text:p>
        </text:list-item>
      </text:list>
      <text:p text:style-name="P5">Učenie detí a mládeže vývoju počítačových hier v oblasti programovania a herného dizajnu, dozor na účastníkov v dennom tábor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adornments="Normálne" style:font-family-generic="roman" style:font-pitch="variable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Arial" fo:font-family="Arial" style:font-family-generic="roman" style:font-pitch="variable" fo:font-size="11pt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class="list">
      <style:paragraph-properties fo:margin-left="0.635cm" fo:margin-right="0cm" fo:margin-top="0cm" fo:margin-bottom="0.353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ody_20_Text_20_2" style:display-name="Body Text 2" style:family="paragraph" style:parent-style-name="Standard" style:default-outline-level="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class="list">
      <style:paragraph-properties fo:margin-left="1.27cm" fo:margin-right="0cm" fo:margin-top="0cm" fo:margin-bottom="0.353cm" style:contextual-spacing="true" fo:text-indent="-0.635cm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1.905cm" fo:margin-right="0cm" fo:margin-top="0cm" fo:margin-bottom="0.353cm" style:contextual-spacing="true" fo:text-indent="-0.635cm" style:auto-text-indent="false"/>
    </style:style>
    <style:style style:name="List_20_Bullet" style:display-name="List Bullet" style:family="paragraph" style:parent-style-name="Standard" style:default-outline-level="" style:list-style-name="WWNum1">
      <style:paragraph-properties fo:margin-top="0cm" fo:margin-bottom="0.353cm" style:contextual-spacing="true"/>
    </style:style>
    <style:style style:name="List_20_Bullet_20_2" style:display-name="List Bullet 2" style:family="paragraph" style:parent-style-name="Standard" style:default-outline-level="" style:list-style-name="WWNum2">
      <style:paragraph-properties fo:margin-top="0cm" fo:margin-bottom="0.353cm" style:contextual-spacing="true"/>
    </style:style>
    <style:style style:name="List_20_Bullet_20_3" style:display-name="List Bullet 3" style:family="paragraph" style:parent-style-name="Standard" style:default-outline-level="" style:list-style-name="WWNum3">
      <style:paragraph-properties fo:margin-top="0cm" fo:margin-bottom="0.353cm" style:contextual-spacing="true"/>
    </style:style>
    <style:style style:name="List_20_Number" style:display-name="List Number" style:family="paragraph" style:parent-style-name="Standard" style:default-outline-level="" style:list-style-name="WWNum5">
      <style:paragraph-properties fo:margin-top="0cm" fo:margin-bottom="0.353cm" style:contextual-spacing="true"/>
    </style:style>
    <style:style style:name="List_20_Number_20_2" style:display-name="List Number 2" style:family="paragraph" style:parent-style-name="Standard" style:default-outline-level="" style:list-style-name="WWNum6">
      <style:paragraph-properties fo:margin-top="0cm" fo:margin-bottom="0.353cm" style:contextual-spacing="true"/>
    </style:style>
    <style:style style:name="List_20_Number_20_3" style:display-name="List Number 3" style:family="paragraph" style:parent-style-name="Standard" style:default-outline-level="" style:list-style-name="WWNum7">
      <style:paragraph-properties fo:margin-top="0cm" fo:margin-bottom="0.353cm" style:contextual-spacing="true"/>
    </style:style>
    <style:style style:name="List_20_Continue" style:display-name="List Continue" style:family="paragraph" style:parent-style-name="Standard" style:default-outline-level="">
      <style:paragraph-properties fo:margin-left="0.635cm" fo:margin-right="0cm" fo:margin-top="0cm" fo:margin-bottom="0.212cm" style:contextual-spacing="true" fo:text-indent="0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1.27cm" fo:margin-right="0cm" fo:margin-top="0cm" fo:margin-bottom="0.212cm" style:contextual-spacing="true" fo:text-indent="0cm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1.905cm" fo:margin-right="0cm" fo:margin-top="0cm" fo:margin-bottom="0.212cm" style:contextual-spacing="true" fo:text-indent="0cm" style:auto-text-indent="false"/>
    </style:style>
    <style:style style:name="macro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style:default-outline-level="">
      <style:text-properties fo:color="#000000" loext:opacity="100%" fo:font-style="italic" style:font-style-asian="italic" style:font-style-complex="italic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353cm" fo:margin-bottom="0.494cm" style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TOC_20_Heading" style:display-name="TOC Heading" style:family="paragraph" style:parent-style-name="Heading_20_1" style:next-style-name="Standard" style:default-outline-level="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loext:opacity="100%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python-docx</meta:initial-creator>
    <dc:description>generated by python-docx</dc:description>
    <meta:editing-cycles>5</meta:editing-cycles>
    <meta:creation-date>2013-12-23T23:15:00</meta:creation-date>
    <dc:date>2026-05-30T23:03:25.877000000</dc:date>
    <meta:editing-duration>P6DT20H43M21S</meta:editing-duration>
    <meta:generator>LibreOffice/7.0.1.2$Windows_X86_64 LibreOffice_project/7cbcfc562f6eb6708b5ff7d7397325de9e764452</meta:generator>
    <meta:document-statistic meta:table-count="0" meta:image-count="0" meta:object-count="0" meta:page-count="2" meta:paragraph-count="28" meta:word-count="336" meta:character-count="2474" meta:non-whitespace-character-count="217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